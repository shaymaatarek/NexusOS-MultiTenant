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935F626326.png" manifest:media-type="image/png"/>
  <manifest:file-entry manifest:full-path="Pictures/10000001000002320000011975A8F4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/>
      <style:text-properties fo:color="#3465a4" loext:opacity="100%"/>
    </style:style>
    <style:style style:name="P2" style:family="paragraph" style:parent-style-name="Heading_20_2">
      <style:text-properties fo:color="#3465a4" loext:opacity="100%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color="#000000" loext:opacity="100%" style:font-name="Liberation Sans" fo:font-size="14pt" officeooo:rsid="0007f75f" officeooo:paragraph-rsid="0007f75f" style:font-size-asian="14pt" style:font-size-complex="14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style:font-name="Liberation Sans" fo:font-size="14pt" style:font-size-asian="14pt" style:font-size-complex="14pt"/>
    </style:style>
    <style:style style:name="P5" style:family="paragraph" style:parent-style-name="Text_20_body" style:list-style-name="L2">
      <style:text-properties style:font-name="Liberation Sans" fo:font-size="14pt" style:font-size-asian="14pt" style:font-size-complex="14pt"/>
    </style:style>
    <style:style style:name="P6" style:family="paragraph" style:parent-style-name="Text_20_body">
      <style:text-properties style:font-name="Liberation Sans" fo:font-size="14pt" style:font-size-asian="14pt" style:font-size-complex="14pt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style:font-name="Liberation Sans" fo:font-size="14pt" officeooo:rsid="000b49a2" officeooo:paragraph-rsid="000b49a2" style:font-size-asian="14pt" style:font-size-complex="14pt"/>
    </style:style>
    <style:style style:name="P8" style:family="paragraph" style:parent-style-name="Text_20_body">
      <style:text-properties style:font-name="Liberation Sans" fo:font-size="14pt" officeooo:rsid="000b49a2" officeooo:paragraph-rsid="000b49a2" style:font-size-asian="14pt" style:font-size-complex="14pt"/>
    </style:style>
    <style:style style:name="P9" style:family="paragraph" style:parent-style-name="Quotations" style:list-style-name="L4">
      <style:text-properties style:font-name="Liberation Sans" fo:font-size="14pt" officeooo:rsid="000e94e3" officeooo:paragraph-rsid="000e94e3" style:font-size-asian="14pt" style:font-size-complex="14pt"/>
    </style:style>
    <style:style style:name="P10" style:family="paragraph" style:parent-style-name="Quotations" style:list-style-name="L4">
      <style:text-properties style:font-name="Liberation Sans" fo:font-size="14pt" officeooo:rsid="000ce529" officeooo:paragraph-rsid="000ce529" style:font-size-asian="14pt" style:font-size-complex="14pt"/>
    </style:style>
    <style:style style:name="P11" style:family="paragraph" style:parent-style-name="Quotations" style:list-style-name="L4">
      <style:text-properties style:font-name="Liberation Sans" fo:font-size="14pt" officeooo:rsid="0012a566" officeooo:paragraph-rsid="0012a566" style:font-size-asian="14pt" style:font-size-complex="14pt"/>
    </style:style>
    <style:style style:name="P12" style:family="paragraph" style:parent-style-name="Heading_20_2" style:list-style-name="L4">
      <style:paragraph-properties fo:margin-left="0in" fo:text-indent="0in" style:auto-text-indent="false"/>
      <style:text-properties fo:color="#3465a4" loext:opacity="100%" style:font-name="Liberation Sans" fo:font-size="16pt" officeooo:rsid="0012a566" officeooo:paragraph-rsid="0012a566" style:font-size-asian="16pt" style:font-size-complex="16pt"/>
    </style:style>
    <style:style style:name="P13" style:family="paragraph" style:parent-style-name="Text_20_body">
      <style:paragraph-properties fo:margin-left="0in" fo:text-indent="0in" style:auto-text-indent="false"/>
      <style:text-properties style:font-name="Liberation Sans" fo:font-size="14pt" officeooo:rsid="0014de51" officeooo:paragraph-rsid="0014de51" style:font-size-asian="14pt" style:font-size-complex="14pt"/>
    </style:style>
    <style:style style:name="P14" style:family="paragraph" style:parent-style-name="Heading_20_2">
      <style:paragraph-properties fo:margin-left="0in" fo:text-indent="0in" style:auto-text-indent="false"/>
      <style:text-properties fo:color="#3465a4" loext:opacity="100%" style:font-name="Liberation Sans" fo:font-size="16pt" officeooo:rsid="0014de51" officeooo:paragraph-rsid="00175cfd" style:font-size-asian="16pt" style:font-size-complex="16pt"/>
    </style:style>
    <style:style style:name="P15" style:family="paragraph" style:parent-style-name="Text_20_body">
      <style:text-properties style:font-name="Liberation Sans" fo:font-size="14pt" officeooo:rsid="000ce529" officeooo:paragraph-rsid="000ce529" style:font-size-asian="14pt" style:font-size-complex="14pt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07a7cf" style:font-size-asian="14pt" style:font-size-complex="14pt"/>
    </style:style>
    <style:style style:name="T3" style:family="text">
      <style:text-properties officeooo:rsid="000b49a2"/>
    </style:style>
    <style:style style:name="T4" style:family="text">
      <style:text-properties officeooo:rsid="001143b7"/>
    </style:style>
    <style:style style:name="T5" style:family="text">
      <style:text-properties officeooo:rsid="000f80f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Inline_20_Heading">
      <style:graphic-properties style:vertical-pos="middle" style:vertical-rel="text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as-char" draw:z-index="0"><draw:text-box fo:min-height="0.0161in" fo:min-width="0.0161in"><text:h text:style-name="P1" text:outline-level="2">1) Define System Vision</text:h></draw:text-box></draw:frame><text:s/></text:p>
      <text:p text:style-name="Standard"/>
      <text:p text:style-name="Standard"><text:span text:style-name="T1">NexusOS is a multi-tenant SaaS administration platform that enables organizations to manage users, products, and </text:span><text:span text:style-name="T2">orders</text:span><text:span text:style-name="T1"> securely through a centralized dashboard.</text:span> </text:p>
      <text:p text:style-name="Standard"/>
      <text:h text:style-name="P2" text:outline-level="2">2) Define Core Modules</text:h>
      <text:list text:style-name="L1">
        <text:list-item>
          <text:p text:style-name="P3">Authentication</text:p>
        </text:list-item>
        <text:list-item>
          <text:p text:style-name="P3">Authorization</text:p>
        </text:list-item>
        <text:list-item>
          <text:p text:style-name="P3">Dashboard</text:p>
        </text:list-item>
        <text:list-item>
          <text:p text:style-name="P3">Tenant Management</text:p>
        </text:list-item>
        <text:list-item>
          <text:p text:style-name="P3">Users Management</text:p>
        </text:list-item>
        <text:list-item>
          <text:p text:style-name="P3">Products Management</text:p>
        </text:list-item>
        <text:list-item>
          <text:p text:style-name="P3">Orders Management</text:p>
        </text:list-item>
      </text:list>
      <text:p text:style-name="Standard"/>
      <text:h text:style-name="P2" text:outline-level="2"><text:span text:style-name="T3">3</text:span>) User Roles</text:h>
      <text:list text:style-name="L2">
        <text:list-item>
          <text:p text:style-name="P4">Super Admin </text:p>
        </text:list-item>
        <text:list-item>
          <text:p text:style-name="P4">Tenant Admin </text:p>
        </text:list-item>
        <text:list-item>
          <text:p text:style-name="P5">User</text:p>
        </text:list-item>
      </text:list>
      <text:p text:style-name="P6"/>
      <text:h text:style-name="P2" text:outline-level="2">4) Plans</text:h>
      <text:list text:style-name="L3">
        <text:list-item>
          <text:p text:style-name="P7">Enterprise</text:p>
        </text:list-item>
        <text:list-item>
          <text:p text:style-name="P7">Pro</text:p>
        </text:list-item>
        <text:list-item>
          <text:p text:style-name="P7">Basic</text:p>
        </text:list-item>
      </text:list>
      <text:p text:style-name="P8"/>
      <text:p text:style-name="P6"><draw:frame draw:style-name="fr2" draw:name="Frame2" text:anchor-type="as-char" draw:z-index="1"><draw:text-box fo:min-height="0.0161in" fo:min-width="0.0161in"><text:h text:style-name="P1" text:outline-level="2">4) User Stories</text:h></draw:text-box></draw:frame><text:s/></text:p>
      <text:list text:style-name="L4">
        <text:list-item>
          <text:p text:style-name="P9">As a Super Admin, I want to <text:span text:style-name="T4">oversee entire system infrastructure and</text:span> <text:span text:style-name="T5">manage tenants.</text:span> </text:p>
        </text:list-item>
        <text:list-item>
          <text:p text:style-name="P10">As a Tenant Admin, I want to create users so that my organization can manage access.</text:p>
        </text:list-item>
        <text:list-item>
          <text:p text:style-name="P11">As a Tenant User, I want to create and manage products and orders depend on given permission.</text:p>
          <text:list>
            <text:list-header>
              <text:h text:style-name="P12" text:outline-level="2"><text:soft-page-break/>5) Use Cases</text:h>
            </text:list-header>
          </text:list>
        </text:list-item>
      </text:list>
      <text:p text:style-name="P13"><draw:frame draw:style-name="fr3" draw:name="Image2" text:anchor-type="char" svg:x="0.1291in" svg:y="0.0917in" svg:width="6.1744in" svg:height="2.7835in" draw:z-index="3"><draw:image xlink:href="Pictures/10000001000002320000011975A8F42C.png" xlink:type="simple" xlink:show="embed" xlink:actuate="onLoad" draw:mime-type="image/png"/></draw:frame></text:p>
      <text:p text:style-name="P13"><text:s text:c="131"/></text:p>
      <text:h text:style-name="P14" text:outline-level="2">6) Entity Relationship Diagram (ERD)</text:h>
      <text:p text:style-name="P13"><draw:frame draw:style-name="fr3" draw:name="Image1" text:anchor-type="char" svg:x="0.2339in" svg:y="0.1016in" svg:width="5.1043in" svg:height="4.2563in" draw:z-index="2"><draw:image xlink:href="Pictures/10000001000001CE000001935F626326.png" xlink:type="simple" xlink:show="embed" xlink:actuate="onLoad" draw:mime-type="image/png"/></draw:frame>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20:50:11.470942300</meta:creation-date>
    <dc:date>2026-05-14T21:09:27.742902800</dc:date>
    <meta:editing-duration>P2DT21H30M33S</meta:editing-duration>
    <meta:editing-cycles>14</meta:editing-cycles>
    <meta:generator>LibreOffice/25.2.7.2$Windows_X86_64 LibreOffice_project/5cbfd1ab6520636bb5f7b99185aa69bd7456825d</meta:generator>
    <meta:document-statistic meta:table-count="0" meta:image-count="2" meta:object-count="0" meta:page-count="2" meta:paragraph-count="27" meta:word-count="127" meta:character-count="860" meta:non-whitespace-character-count="636"/>
  </office:meta>
</office:document-meta>
</file>